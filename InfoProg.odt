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5"/>
    <style:style style:name="P4" style:family="paragraph" style:parent-style-name="Standard">
      <style:text-properties fo:language="it" fo:country="IT" officeooo:rsid="000b12aa" officeooo:paragraph-rsid="000b12aa"/>
    </style:style>
    <style:style style:name="P5" style:family="paragraph" style:parent-style-name="Standard" style:list-style-name="L1">
      <style:text-properties fo:language="it" fo:country="IT" officeooo:rsid="000b12aa" officeooo:paragraph-rsid="000b12aa"/>
    </style:style>
    <style:style style:name="P6" style:family="paragraph" style:parent-style-name="Standard" style:list-style-name="L1">
      <style:text-properties fo:language="it" fo:country="IT" officeooo:rsid="000ee005" officeooo:paragraph-rsid="000ee005"/>
    </style:style>
    <style:style style:name="P7" style:family="paragraph" style:parent-style-name="Standard" style:list-style-name="L1">
      <style:text-properties fo:language="it" fo:country="IT" officeooo:rsid="000eea1c" officeooo:paragraph-rsid="000eea1c"/>
    </style:style>
    <style:style style:name="T1" style:family="text">
      <style:text-properties fo:language="it" fo:country="I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GIOTTO-RT</text:span><text:span text:style-name="T1"/></text:p>
      <text:p text:style-name="P1" loext:marker-style-name="T1"/>
      <text:p text:style-name="Standard" loext:marker-style-name="T1"><text:span text:style-name="T1">Progetto robot che disegna qualcosa da solo. L’ESP32 è collegato ad Internet ed in particolare ad una interfaccia web. Tramite essa è possibile digitare un prompt con l’immagine da voler disegnare oppure dare in input direttamente l’immagine da far disegnare.</text:span><text:span text:style-name="T1"/></text:p>
      <text:p text:style-name="Standard" loext:marker-style-name="T1"><text:span text:style-name="T1">Nel primo caso ci sarà un modello di Generazione di immagini che genera un’immagine in bianco e nero che darà in input all’ESP32. <text:s text:c="2"/>Nice-to-have</text:span><text:span text:style-name="T1"/></text:p>
      <text:p text:style-name="Standard" loext:marker-style-name="T1"><text:span text:style-name="T1">Nel secondo caso l’immagine da dare in input dovrà già essere in bianco e nero di dimensione prefissata.</text:span><text:span text:style-name="T1"/></text:p>
      <text:p text:style-name="Standard" loext:marker-style-name="T1"><text:span text:style-name="T1">Il nodo Host si occuperà poi di estrarre i contorni dell’immagine (es. Canny Algorithm) per poi tradurlo in coordinate da dare a GIOTTO. </text:span><text:span text:style-name="T1"/></text:p>
      <text:p text:style-name="Standard" loext:marker-style-name="T1"><text:span text:style-name="T1">Le coordinate verranno inviate usando dei topic appositi.</text:span><text:span text:style-name="T1"/></text:p>
      <text:p text:style-name="Standard" loext:marker-style-name="T1"><text:span text:style-name="T1">Giotto rimane in ascolto sul topic, quando riceve delle coordinate le processa subito.</text:span><text:span text:style-name="T1"/></text:p>
      <text:p text:style-name="Standard" loext:marker-style-name="T1"><text:span text:style-name="T1">Per evitare ritardi o lag dovuti al WiFi, i comandi non sono inviati direttamente ai bracci ma salvati in una coda (FIFO), e il task collegato ai bracci pescheranno le coordinate dalla coda ad un ritmo meccanico.</text:span><text:span text:style-name="T1"/></text:p>
      <text:p text:style-name="Standard" loext:marker-style-name="T1"><text:span text:style-name="T1">Poiché i motori non si muovono lungo linee rette, ma ruotano su perni è necessario convertire le coordinate in angoli tramite formule di Cinematica inversa.</text:span><text:span text:style-name="T1"/></text:p>
      <text:p text:style-name="Standard" loext:marker-style-name="T1"><text:span text:style-name="T1">Il task calcola la distanza tra la posizione attuale e la nuova coordinata, calcola dei punti intermedi per evitare scatti violenti da un punto all’altro.</text:span><text:span text:style-name="T1"/></text:p>
      <text:p text:style-name="P1" loext:marker-style-name="T1"/>
      <text:p text:style-name="Standard"><text:span text:style-name="T1">Questo è il progetto in generale. <text:line-break/></text:span>Ecco i task real time:</text:p>
      <text:list text:style-name="WWNum1">
        <text:list-item>
          <text:p text:style-name="P2" loext:marker-style-name="T1"><text:span text:style-name="T1">Trask traiettoria: preleva le coordinate dalla coda dei messaggi, calcola le posizioni intermedie, applica la cinematica inversa per ottenere gli angoli e aggiorna i registri PWM per i servomotori principali</text:span><text:span text:style-name="T1"/></text:p>
          <text:list>
            <text:list-item>
              <text:p text:style-name="P2" loext:marker-style-name="T1"><text:span text:style-name="T1">Periodico (T=20ms)</text:span><text:span text:style-name="T1"/></text:p>
            </text:list-item>
            <text:list-item>
              <text:p text:style-name="P2" loext:marker-style-name="T1"><text:span text:style-name="T1">Priorità alta</text:span><text:span text:style-name="T1"/></text:p>
            </text:list-item>
          </text:list>
        </text:list-item>
        <text:list-item>
          <text:p text:style-name="P2" loext:marker-style-name="T1"><text:soft-page-break/><text:span text:style-name="T1">Task comunicazione: esegue un polling per verificare l’arrivo dei nuovi messaggi dal topic ROS2. Quando riceve un pacchetto contenente le coordinate, acquisisce la coda e inserisce i dati</text:span><text:span text:style-name="T1"/></text:p>
          <text:list>
            <text:list-item>
              <text:p text:style-name="P2" loext:marker-style-name="T1"><text:span text:style-name="T1">Aperiodico</text:span><text:span text:style-name="T1"/></text:p>
            </text:list-item>
            <text:list-item>
              <text:p text:style-name="P2" loext:marker-style-name="T1"><text:span text:style-name="T1">Priorità media</text:span><text:span text:style-name="T1"/></text:p>
            </text:list-item>
          </text:list>
        </text:list-item>
        <text:list-item>
          <text:p text:style-name="P2" loext:marker-style-name="T1"><text:span text:style-name="T1">Task attuatore penna: legge i comandi dalla coda per l’asse Z, e fa alzare e abbassare la penna quando necessario</text:span><text:span text:style-name="T1"/></text:p>
          <text:list>
            <text:list-item>
              <text:p text:style-name="P2" loext:marker-style-name="T1"><text:span text:style-name="T1">Aperiodico</text:span><text:span text:style-name="T1"/></text:p>
            </text:list-item>
            <text:list-item>
              <text:p text:style-name="P2" loext:marker-style-name="T1"><text:span text:style-name="T1">Priorità bassa</text:span><text:span text:style-name="T1"/></text:p>
            </text:list-item>
          </text:list>
        </text:list-item>
        <text:list-item>
          <text:p text:style-name="P2" loext:marker-style-name="T1"><text:span text:style-name="T1">Task Digital Twin: invia le informazioni indietro al Host in modo che si veda in tempo reale dal sito web quello che sta venendo disegnato</text:span><text:span text:style-name="T1"/></text:p>
          <text:list>
            <text:list-item>
              <text:p text:style-name="P2" loext:marker-style-name="T1"><text:span text:style-name="T1">Periodico (T=50ms)</text:span><text:span text:style-name="T1"/></text:p>
            </text:list-item>
            <text:list-item>
              <text:p text:style-name="P2" loext:marker-style-name="T1"><text:span text:style-name="T1">Priorità media </text:span><text:span text:style-name="T1"/></text:p>
            </text:list-item>
          </text:list>
        </text:list-item>
      </text:list>
      <text:p text:style-name="P1" loext:marker-style-name="T1"/>
      <text:p text:style-name="Standard" loext:marker-style-name="T1"><text:span text:style-name="T1">Componenti Giotto</text:span><text:span text:style-name="T1"/></text:p>
      <text:p text:style-name="Standard" loext:marker-style-name="T1"><text:span text:style-name="T1">https://makerworld.com/it/models/978425-scara-2d-drawing-robot-esp32-five-bar-link?from=search#profileId-951679</text:span><text:span text:style-name="T1"/></text:p>
      <text:list text:style-name="WWNum5">
        <text:list-item>
          <text:p text:style-name="P3" loext:marker-style-name="T1"><text:span text:style-name="T1">1x Esp32-C3 Super Mini</text:span><text:span text:style-name="T1"/></text:p>
        </text:list-item>
        <text:list-item>
          <text:p text:style-name="P3" loext:marker-style-name="T1"><text:span text:style-name="T1">2x Scheda di Espansione Esp32</text:span><text:span text:style-name="T1"/></text:p>
        </text:list-item>
        <text:list-item>
          <text:p text:style-name="P3" loext:marker-style-name="T1"><text:span text:style-name="T1">3x Servomotori SG90 </text:span><text:span text:style-name="T1"/></text:p>
        </text:list-item>
        <text:list-item>
          <text:p text:style-name="P3">6x viti autofilettanti Bt2x10 SHCS <text:s text:c="2"/></text:p>
          <text:list>
            <text:list-item>
              <text:p text:style-name="P3">(<text:a xlink:type="simple" xlink:href="https://eu.store.bambulab.com/products/bt2-socket-head-cap-self-tapping-screws-shcs" text:style-name="Internet_20_link" text:visited-style-name="Visited_20_Internet_20_Link"><text:span text:style-name="Internet_20_link">https://eu.store.bambulab.com/products/bt2-socket-head-cap-self-tapping-screws-shcs</text:span></text:a> new?skr=yes&amp;id=48694574416220&amp;modelId=978425)</text:p>
            </text:list-item>
          </text:list>
        </text:list-item>
        <text:list-item>
          <text:p text:style-name="P3" loext:marker-style-name="T1"><text:span text:style-name="T1">3x M3x8 BHCS<text:tab/></text:span><text:span text:style-name="T1"/></text:p>
          <text:list>
            <text:list-item>
              <text:p text:style-name="P3" loext:marker-style-name="T1"><text:span text:style-name="T1">(https://eu.store.bambulab.com/products/m3-button-head-cap-machine-screws-bhcs?skr=yes&amp;id=48671486935388&amp;modelId=978425)</text:span><text:span text:style-name="T1"/></text:p>
            </text:list-item>
          </text:list>
        </text:list-item>
        <text:list-item>
          <text:p text:style-name="P3" loext:marker-style-name="T1"><text:span text:style-name="T1">1x M3x40 SHCS</text:span><text:span text:style-name="T1"/></text:p>
        </text:list-item>
        <text:list-item>
          <text:p text:style-name="P3" loext:marker-style-name="T1"><text:span text:style-name="T1">Elastico</text:span><text:span text:style-name="T1"/></text:p>
        </text:list-item>
        <text:list-item>
          <text:p text:style-name="P3" loext:marker-style-name="T1"><text:span text:style-name="T1">Penna </text:span><text:span text:style-name="T1"/></text:p>
        </text:list-item>
      </text:list>
      <text:p text:style-name="P1" loext:marker-style-name="T1"/>
      <text:p text:style-name="P1" loext:marker-style-name="T1"/>
      <text:p text:style-name="P4" loext:marker-style-name="T1"><text:soft-page-break/>Esp32 non funziona, uso l’arduino invece</text:p>
      <text:p text:style-name="P4" loext:marker-style-name="T1">I nuovi task sono</text:p>
      <text:list text:style-name="L1">
        <text:list-item>
          <text:p text:style-name="P5">Task Motori: legge da una coda FIFO le coordinate dove andare, queste riguardano coordinate x,y ma anche z (alzare o abbassare la penna)</text:p>
          <text:list>
            <text:list-item>
              <text:p text:style-name="P5">Periodico</text:p>
            </text:list-item>
            <text:list-item>
              <text:p text:style-name="P5">Periodo (T=D): 20ms</text:p>
            </text:list-item>
            <text:list-item>
              <text:p text:style-name="P5">Priorità media</text:p>
            </text:list-item>
            <text:list-item>
              <text:p text:style-name="P6">WCET: 60 + 4 = 64 microsecondi = 0.064 ms</text:p>
            </text:list-item>
          </text:list>
        </text:list-item>
        <text:list-item>
          <text:p text:style-name="P5">Task Telemetria: Controlla lo stato di Giotto (angolazione bracci, posti in coda) e li invia al nodo HOST</text:p>
          <text:list>
            <text:list-item>
              <text:p text:style-name="P5">Periodico</text:p>
            </text:list-item>
            <text:list-item>
              <text:p text:style-name="P5">Periodo (T=D): 50ms</text:p>
            </text:list-item>
            <text:list-item>
              <text:p text:style-name="P5">Priorità bassa</text:p>
            </text:list-item>
          </text:list>
        </text:list-item>
        <text:list-item>
          <text:p text:style-name="P5">Task Ricezione: prende i pacchetti in arrivo dall’HOST all’Arduino e li mette in coda</text:p>
          <text:list>
            <text:list-item>
              <text:p text:style-name="P5">Aperiodico</text:p>
            </text:list-item>
            <text:list-item>
              <text:p text:style-name="P5">Priorità alta</text:p>
            </text:list-item>
            <text:list-item>
              <text:p text:style-name="P7">WCET: 356 + 4 = 360 microsecondi = 0.36 ms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mone Aresta</meta:initial-creator>
    <meta:editing-cycles>6</meta:editing-cycles>
    <meta:creation-date>2026-06-24T08:42:00</meta:creation-date>
    <dc:date>2026-06-30T09:24:55.677577841</dc:date>
    <meta:editing-duration>PT1H39M51S</meta:editing-duration>
    <meta:generator>LibreOffice/25.8.7.3$Linux_X86_64 LibreOffice_project/580$Build-3</meta:generator>
    <meta:document-statistic meta:table-count="0" meta:image-count="0" meta:object-count="0" meta:page-count="3" meta:paragraph-count="50" meta:word-count="508" meta:character-count="3266" meta:non-whitespace-character-count="2832"/>
    <meta:user-defined meta:name="AppVersion">16.0000</meta:user-defined>
    <meta:template xlink:type="simple" xlink:actuate="onRequest" xlink:title="Normal.dotm" xlink:href=""/>
  </office:meta>
</office:document-meta>
</file>